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Oxygen, Ubuntu, Cantarell, 'Fira Sans', 'Droid Sans', 'Helvetica Neue', sans-serif"/>
  </office:font-face-decls>
  <office:automatic-styles>
    <style:style style:name="P1" style:family="paragraph" style:parent-style-name="Heading_20_2">
      <style:text-properties fo:font-variant="normal" fo:text-transform="none" fo:color="#333333" loext:opacity="100%" style:font-name="apple-system" fo:font-size="9pt" fo:letter-spacing="normal" fo:font-style="normal" fo:font-weight="bold"/>
    </style:style>
    <style:style style:name="P2"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333333" loext:opacity="100%" style:font-name="apple-system" fo:font-size="9pt" fo:letter-spacing="normal" fo:font-style="normal" fo:font-weight="normal"/>
    </style:style>
    <style:style style:name="P3" style:family="paragraph" style:parent-style-name="Text_20_body">
      <style:paragraph-properties fo:margin-left="0.053cm" fo:margin-right="0.053cm" fo:margin-top="0cm" fo:margin-bottom="0cm" style:contextual-spacing="false" style:line-height-at-least="0.529cm" fo:orphans="2" fo:widows="2" fo:text-indent="0cm" style:auto-text-indent="false"/>
    </style:style>
    <style:style style:name="P4" style:family="paragraph" style:parent-style-name="Text_20_body">
      <style:paragraph-properties fo:margin-left="0cm" fo:margin-right="0cm" fo:margin-top="0cm" fo:margin-bottom="0cm" style:contextual-spacing="false" style:line-height-at-least="0.529cm" fo:orphans="2" fo:widows="2" fo:text-indent="0cm" style:auto-text-indent="false"/>
    </style:style>
    <style:style style:name="P5" style:family="paragraph" style:parent-style-name="Text_20_body" style:list-style-name="L1">
      <style:paragraph-properties fo:margin-left="0.053cm" fo:margin-right="0.053cm" fo:margin-top="0cm" fo:margin-bottom="0cm" style:contextual-spacing="false" style:line-height-at-least="0.529cm"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cm" style:contextual-spacing="false" style:line-height-at-least="0.529cm" fo:orphans="2" fo:widows="2" fo:text-indent="0cm" style:auto-text-indent="false" fo:padding="0cm" fo:border="none"/>
    </style:style>
    <style:style style:name="T1" style:family="text">
      <style:text-properties fo:font-variant="normal" fo:text-transform="none" fo:color="#333333" loext:opacity="100%" style:font-name="apple-system" fo:font-size="9pt" fo:letter-spacing="normal" fo:font-style="normal" fo:font-weight="normal"/>
    </style:style>
    <style:style style:name="T2" style:family="text">
      <style:text-properties fo:font-variant="normal" fo:text-transform="none" fo:color="#000000" loext:opacity="100%" fo:font-family="source-code-pro, Menlo, Monaco, Consolas, 'Courier New', monospace" fo:font-size="6.75pt" fo:letter-spacing="normal" fo:font-style="normal" fo:font-weight="normal" fo:background-color="#1b1f23" loext:char-shading-value="0" loext:padding="0.049cm" loext:border="0.06pt solid #eaeaea"/>
    </style:style>
    <style:style style:name="T3" style:family="text">
      <style:text-properties fo:font-variant="normal" fo:text-transform="none" fo:color="#333333" loext:opacity="100%" style:font-name="apple-system" fo:font-size="9pt" fo:letter-spacing="normal" fo:font-style="normal" fo:font-weight="bold"/>
    </style:style>
    <style:style style:name="T4" style:family="text">
      <style:text-properties fo:font-variant="normal" fo:text-transform="none" fo:color="#5584ff" loext:opacity="100%" style:text-line-through-style="none" style:text-line-through-type="none" style:font-name="apple-system" fo:font-size="9pt" fo:letter-spacing="normal" fo:font-style="normal" style:text-underline-style="none" fo:font-weight="normal" style:text-blinking="false" fo:background-color="transparent" loext:char-shading-value="0"/>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structions</text:h>
      <text:p text:style-name="P2">Follow the instructions and get all the user stories below to pass to finish the project.</text:p>
      <text:p text:style-name="P3"><text:span text:style-name="T1">You start with several files, one of them is </text:span><text:span text:style-name="Source_20_Text"><text:span text:style-name="T2">games.csv</text:span></text:span><text:span text:style-name="T1">. It contains a comma-separated list of all games of the final three rounds of the World Cup tournament since 2014; the titles are at the top. It includes the year of each game, the round of the game, the winner, their opponent, and the number of goals each team scored. You need to do three things for this project:</text:span></text:p>
      <text:p text:style-name="P2">Part 1: Create the database</text:p>
      <text:p text:style-name="P3"><text:span text:style-name="T1">Log into the psql interactive terminal with </text:span><text:span text:style-name="Source_20_Text"><text:span text:style-name="T2">psql --username=freecodecamp --dbname=postgres</text:span></text:span><text:span text:style-name="T1"> and create your database structure according to the user stories below.</text:span></text:p>
      <text:p text:style-name="P4"><text:span text:style-name="Strong_20_Emphasis"><text:span text:style-name="T3">Don't forget to connect to the database after you create it</text:span></text:span><text:span text:style-name="T1">.</text:span></text:p>
      <text:p text:style-name="P2">Part 2: Insert the data</text:p>
      <text:p text:style-name="P3"><text:span text:style-name="T1">Complete the </text:span><text:span text:style-name="Source_20_Text"><text:span text:style-name="T2">insert_data.sh</text:span></text:span><text:span text:style-name="T1"> script to correctly insert all the data from </text:span><text:span text:style-name="Source_20_Text"><text:span text:style-name="T2">games.csv</text:span></text:span><text:span text:style-name="T1"> into the database. The file is started for you. Do not modify any of the code you start with. Using the </text:span><text:span text:style-name="Source_20_Text"><text:span text:style-name="T2">PSQL</text:span></text:span><text:span text:style-name="T1"> variable defined, you can make database queries like this: </text:span><text:span text:style-name="Source_20_Text"><text:span text:style-name="T2">$($PSQL "&lt;query_here&gt;")</text:span></text:span><text:span text:style-name="T1">. The tests have a 20 second limit, so try to make your script efficient. The less you have to query the database, the faster it will be. You can empty the rows in the tables of your database with </text:span><text:span text:style-name="Source_20_Text"><text:span text:style-name="T2">TRUNCATE TABLE games, teams;</text:span></text:span></text:p>
      <text:p text:style-name="P2">Part 3: Query the database</text:p>
      <text:p text:style-name="P3"><text:span text:style-name="T1">Complete the empty </text:span><text:span text:style-name="Source_20_Text"><text:span text:style-name="T2">echo</text:span></text:span><text:span text:style-name="T1"> commands in the </text:span><text:span text:style-name="Source_20_Text"><text:span text:style-name="T2">queries.sh</text:span></text:span><text:span text:style-name="T1"> file to produce output that matches the </text:span><text:span text:style-name="Source_20_Text"><text:span text:style-name="T2">expected_output.txt</text:span></text:span><text:span text:style-name="T1"> file. The file has some starter code, and the first query is completed for you. Use the </text:span><text:span text:style-name="Source_20_Text"><text:span text:style-name="T2">PSQL</text:span></text:span><text:span text:style-name="T1"> variable defined to complete rest of the queries. Note that you need to have your database filled with the correct data from the script to get the correct results from your queries. Hint: Test your queries in the psql prompt first and then add them to the script file.</text:span></text:p>
      <text:p text:style-name="P3"><text:span text:style-name="Strong_20_Emphasis"><text:span text:style-name="T3">Notes:</text:span></text:span><text:span text:style-name="T1"><text:line-break/>If you leave your virtual machine, your database may not be saved. You can make a dump of it by entering </text:span><text:span text:style-name="Source_20_Text"><text:span text:style-name="T2">pg_dump -cC --inserts -U freecodecamp worldcup &gt; worldcup.sql</text:span></text:span><text:span text:style-name="T1"> in a bash terminal (not the psql one). It will save the commands to rebuild your database in </text:span><text:span text:style-name="Source_20_Text"><text:span text:style-name="T2">worldcup.sql</text:span></text:span><text:span text:style-name="T1">. The file will be located where the command was entered. If it's anything inside the </text:span><text:span text:style-name="Source_20_Text"><text:span text:style-name="T2">project</text:span></text:span><text:span text:style-name="T1"> folder, the file will be saved in the VM. You can rebuild the database by entering </text:span><text:span text:style-name="Source_20_Text"><text:span text:style-name="T2">psql -U postgres &lt; worldcup.sql</text:span></text:span><text:span text:style-name="T1"> in a terminal where the </text:span><text:span text:style-name="Source_20_Text"><text:span text:style-name="T2">.sql</text:span></text:span><text:span text:style-name="T1"> file is.</text:span></text:p>
      <text:p text:style-name="P4"><text:span text:style-name="T1">If you are saving your progress on </text:span><text:a xlink:type="simple" xlink:href="http://freecodecamp.org/" text:style-name="Internet_20_link" text:visited-style-name="Visited_20_Internet_20_Link"><text:span text:style-name="T4">freeCodeCamp.org</text:span></text:a><text:span text:style-name="T1">, after getting all the tests to pass, follow the instructions above to save a dump of your database. Save the </text:span><text:span text:style-name="Source_20_Text"><text:span text:style-name="T2">worldcup.sql</text:span></text:span><text:span text:style-name="T1"> file, as well as the final version of your </text:span><text:span text:style-name="Source_20_Text"><text:span text:style-name="T2">insert_data.sh</text:span></text:span><text:span text:style-name="T1"> and </text:span><text:span text:style-name="Source_20_Text"><text:span text:style-name="T2">queries.sh</text:span></text:span><text:span text:style-name="T1"> files, in a public repository and submit the URL to it on </text:span><text:a xlink:type="simple" xlink:href="http://freecodecamp.org/" text:style-name="Internet_20_link" text:visited-style-name="Visited_20_Internet_20_Link"><text:span text:style-name="T4">freeCodeCamp.org</text:span></text:a><text:span text:style-name="T1">.</text:span></text:p>
      <text:p text:style-name="P2">Complete the tasks below</text:p>
      <text:list text:style-name="L1">
        <text:list-item>
          <text:p text:style-name="P5"><text:span text:style-name="T1">You should create a database named </text:span><text:span text:style-name="Source_20_Text"><text:span text:style-name="T2">worldcup</text:span></text:span></text:p>
        </text:list-item>
        <text:list-item>
          <text:p text:style-name="P5"><text:span text:style-name="T1">You should </text:span><text:span text:style-name="Strong_20_Emphasis"><text:span text:style-name="T3">connect to your worldcup database</text:span></text:span><text:span text:style-name="T1"> and then create </text:span><text:span text:style-name="Source_20_Text"><text:span text:style-name="T2">teams</text:span></text:span><text:span text:style-name="T1"> and </text:span><text:span text:style-name="Source_20_Text"><text:span text:style-name="T2">games</text:span></text:span><text:span text:style-name="T1"> tables</text:span></text:p>
        </text:list-item>
        <text:list-item>
          <text:p text:style-name="P5"><text:span text:style-name="T1">Your </text:span><text:span text:style-name="Source_20_Text"><text:span text:style-name="T2">teams</text:span></text:span><text:span text:style-name="T1"> table should have a </text:span><text:span text:style-name="Source_20_Text"><text:span text:style-name="T2">team_id</text:span></text:span><text:span text:style-name="T1"> column that is a type of </text:span><text:span text:style-name="Source_20_Text"><text:span text:style-name="T2">SERIAL</text:span></text:span><text:span text:style-name="T1"> and is the primary key, and a </text:span><text:span text:style-name="Source_20_Text"><text:span text:style-name="T2">name</text:span></text:span><text:span text:style-name="T1"> column that has to be </text:span><text:span text:style-name="Source_20_Text"><text:span text:style-name="T2">UNIQUE</text:span></text:span></text:p>
        </text:list-item>
        <text:list-item>
          <text:p text:style-name="P5"><text:span text:style-name="T1">Your </text:span><text:span text:style-name="Source_20_Text"><text:span text:style-name="T2">games</text:span></text:span><text:span text:style-name="T1"> table should have a </text:span><text:span text:style-name="Source_20_Text"><text:span text:style-name="T2">game_id</text:span></text:span><text:span text:style-name="T1"> column that is a type of </text:span><text:span text:style-name="Source_20_Text"><text:span text:style-name="T2">SERIAL</text:span></text:span><text:span text:style-name="T1"> and is the primary key, a </text:span><text:span text:style-name="Source_20_Text"><text:span text:style-name="T2">year</text:span></text:span><text:span text:style-name="T1"> column of type </text:span><text:span text:style-name="Source_20_Text"><text:span text:style-name="T2">INT</text:span></text:span><text:span text:style-name="T1">, and a </text:span><text:span text:style-name="Source_20_Text"><text:span text:style-name="T2">round</text:span></text:span><text:span text:style-name="T1"> column of type </text:span><text:span text:style-name="Source_20_Text"><text:span text:style-name="T2">VARCHAR</text:span></text:span></text:p>
        </text:list-item>
        <text:list-item>
          <text:p text:style-name="P5"><text:span text:style-name="T1">Your </text:span><text:span text:style-name="Source_20_Text"><text:span text:style-name="T2">games</text:span></text:span><text:span text:style-name="T1"> table should have </text:span><text:span text:style-name="Source_20_Text"><text:span text:style-name="T2">winner_id</text:span></text:span><text:span text:style-name="T1"> and </text:span><text:span text:style-name="Source_20_Text"><text:span text:style-name="T2">opponent_id</text:span></text:span><text:span text:style-name="T1"> foreign key columns that each reference </text:span><text:span text:style-name="Source_20_Text"><text:span text:style-name="T2">team_id</text:span></text:span><text:span text:style-name="T1"> from the </text:span><text:span text:style-name="Source_20_Text"><text:span text:style-name="T2">teams</text:span></text:span><text:span text:style-name="T1"> table</text:span></text:p>
        </text:list-item>
        <text:list-item>
          <text:p text:style-name="P5"><text:span text:style-name="T1">Your </text:span><text:span text:style-name="Source_20_Text"><text:span text:style-name="T2">games</text:span></text:span><text:span text:style-name="T1"> table should have </text:span><text:span text:style-name="Source_20_Text"><text:span text:style-name="T2">winner_goals</text:span></text:span><text:span text:style-name="T1"> and </text:span><text:span text:style-name="Source_20_Text"><text:span text:style-name="T2">opponent_goals</text:span></text:span><text:span text:style-name="T1"> columns that are type </text:span><text:span text:style-name="Source_20_Text"><text:span text:style-name="T2">INT</text:span></text:span></text:p>
        </text:list-item>
        <text:list-item>
          <text:p text:style-name="P5"><text:span text:style-name="T1">All of your columns should have the </text:span><text:span text:style-name="Source_20_Text"><text:span text:style-name="T2">NOT NULL</text:span></text:span><text:span text:style-name="T1"> constraint</text:span></text:p>
        </text:list-item>
        <text:list-item>
          <text:p text:style-name="P5"><text:span text:style-name="T1">Your two script (</text:span><text:span text:style-name="Source_20_Text"><text:span text:style-name="T2">.sh</text:span></text:span><text:span text:style-name="T1">) files should have executable permissions. Other tests involving these two files will fail until permissions are correct. When these permissions are enabled, the tests will take significantly longer to run</text:span></text:p>
        </text:list-item>
        <text:list-item>
          <text:p text:style-name="P5"><text:span text:style-name="T1">When you run your </text:span><text:span text:style-name="Source_20_Text"><text:span text:style-name="T2">insert_data.sh</text:span></text:span><text:span text:style-name="T1"> script, it should add each unique team to the </text:span><text:span text:style-name="Source_20_Text"><text:span text:style-name="T2">teams</text:span></text:span><text:span text:style-name="T1"> table. There should be 24 rows</text:span></text:p>
        </text:list-item>
        <text:list-item>
          <text:p text:style-name="P5"><text:span text:style-name="T1">When you run your </text:span><text:span text:style-name="Source_20_Text"><text:span text:style-name="T2">insert_data.sh</text:span></text:span><text:span text:style-name="T1"> script, it should insert a row for each line in the </text:span><text:span text:style-name="Source_20_Text"><text:span text:style-name="T2">games.csv</text:span></text:span><text:span text:style-name="T1"> file (other than the top line of the file). There should be 32 rows. Each row should have every column filled in with the appropriate info. Make sure to add the correct ID's from the teams table (you cannot hard-code the values)</text:span></text:p>
        </text:list-item>
        <text:list-item>
          <text:p text:style-name="P6"><text:soft-page-break/><text:span text:style-name="T1">You should correctly complete the queries in the </text:span><text:span text:style-name="Source_20_Text"><text:span text:style-name="T2">queries.sh</text:span></text:span><text:span text:style-name="T1"> file. Fill in each empty </text:span><text:span text:style-name="Source_20_Text"><text:span text:style-name="T2">echo</text:span></text:span><text:span text:style-name="T1"> command to get the output of what is suggested with the command above it. Only use a single line like the first query. The output should match what is in the </text:span><text:span text:style-name="Source_20_Text"><text:span text:style-name="T2">expected_output.txt</text:span></text:span><text:span text:style-name="T1"> file </text:span><text:span text:style-name="Strong_20_Emphasis"><text:span text:style-name="T3">exactly</text:span></text:span><text:span text:style-name="T1">, take note of the number of decimal places in some of the query results</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Oxygen, Ubuntu, Cantarell, 'Fira Sans', 'Droid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15:07.063428300</meta:creation-date>
    <dc:date>2026-06-15T11:20:58.293100600</dc:date>
    <meta:editing-duration>PT55M38S</meta:editing-duration>
    <meta:editing-cycles>1</meta:editing-cycles>
    <meta:document-statistic meta:table-count="0" meta:image-count="0" meta:object-count="0" meta:page-count="2" meta:paragraph-count="24" meta:word-count="770" meta:character-count="4319" meta:non-whitespace-character-count="3587"/>
    <meta:generator>LibreOffice/25.8.6.2$Windows_X86_64 LibreOffice_project/b4b39682cd9868fa725bc664aff94278d315bd04</meta:generator>
  </office:meta>
</office:document-meta>
</file>